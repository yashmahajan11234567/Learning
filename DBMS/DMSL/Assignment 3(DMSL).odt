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38427C8C479FC058527.png" manifest:media-type="image/png"/>
  <manifest:file-entry manifest:full-path="Pictures/10000201000005A000000384F47D50380CE71632.png" manifest:media-type="image/png"/>
  <manifest:file-entry manifest:full-path="Pictures/10000201000005A000000384EE3A51B789FD58DB.png" manifest:media-type="image/png"/>
  <manifest:file-entry manifest:full-path="Pictures/10000201000005A000000384BC3A066CADABCE82.png" manifest:media-type="image/png"/>
  <manifest:file-entry manifest:full-path="Pictures/10000201000005A0000003844233FE56D16A48E9.png" manifest:media-type="image/png"/>
  <manifest:file-entry manifest:full-path="Pictures/10000201000005A0000003848A1C10EC735510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85c" officeooo:paragraph-rsid="0017e85c"/>
    </style:style>
    <style:style style:name="T1" style:family="text">
      <style:text-properties fo:font-size="14pt" officeooo:rsid="0017e85c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631cm, 0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28cm, 0cm, 10.1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752cm, 0cm, 14.37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5.743cm, 0cm, -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8.68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6.3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3.13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3.1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3(DMSL)</text:span></text:p>
      <text:p text:style-name="Standard"><text:span text:style-name="T1">Table 1: Students</text:span></text:p>
      <text:p text:style-name="Standard"><text:span text:style-name="T1">Columns:</text:span></text:p>
      <text:p text:style-name="Standard"><text:span text:style-name="T1"> StudentID (Integer, PRIMARY KEY, NOT NULL)</text:span></text:p>
      <text:p text:style-name="Standard"><text:span text:style-name="T1"> FirstName (VARCHAR(50), NOT NULL)</text:span></text:p>
      <text:p text:style-name="Standard"><text:span text:style-name="T1"> LastName (VARCHAR(50))</text:span></text:p>
      <text:p text:style-name="Standard"><text:span text:style-name="T1"> Email (VARCHAR(100), UNIQUE)</text:span></text:p>
      <text:p text:style-name="Standard"><text:span text:style-name="T1"> DOB (DATE, NOT NULL)</text:span></text:p>
      <text:p text:style-name="Standard"><text:span text:style-name="T1"> CourseID (Integer, FOREIGN KEY references Courses(CourseID))</text:span></text:p>
      <text:p text:style-name="Standard"><text:span text:style-name="T1"/></text:p>
      <text:p text:style-name="Standard"><text:span text:style-name="T1"/></text:p>
      <text:p text:style-name="Standard"><text:span text:style-name="T1">Table 2: Courses</text:span></text:p>
      <text:p text:style-name="Standard"><text:span text:style-name="T1">Columns:</text:span></text:p>
      <text:p text:style-name="Standard"><text:span text:style-name="T1"> CourseID (Integer, PRIMARY KEY, NOT NULL)</text:span></text:p>
      <text:p text:style-name="Standard"><text:span text:style-name="T1"> CourseName (VARCHAR(100), NOT NULL, UNIQUE)</text:span></text:p>
      <text:p text:style-name="Standard"><text:span text:style-name="T1"> Credits (Integer, DEFAULT 3)</text:span></text:p>
      <text:p text:style-name="P1"><text:span text:style-name="T1">+</text:span></text:p>
      <text:p text:style-name="Standard"><text:span text:style-name="T1">3. Insert records into the tables while ensuring the constraints are not violated.</text:span></text:p>
      <text:p text:style-name="Standard"><draw:frame draw:style-name="fr9" draw:name="Image1" text:anchor-type="char" svg:x="-1.998cm" svg:y="0.328cm" svg:width="20.999cm" svg:height="9.209cm" draw:z-index="0"><draw:image xlink:href="Pictures/10000201000005A0000003848A1C10EC73551042.png" xlink:type="simple" xlink:show="embed" xlink:actuate="onLoad" loext:mime-type="image/png"/></draw:frame><text:span text:style-name="T1"/></text:p>
      <text:p text:style-name="Standard"><draw:frame draw:style-name="fr8" draw:name="Image2" text:anchor-type="char" svg:x="-2cm" svg:y="2.683cm" svg:width="21.001cm" svg:height="5.886cm" draw:z-index="1"><draw:image xlink:href="Pictures/10000201000005A0000003844233FE56D16A48E9.png" xlink:type="simple" xlink:show="embed" xlink:actuate="onLoad" loext:mime-type="image/png"/></draw:frame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4. Test the Constraints</text:span></text:p>
      <text:p text:style-name="Standard"><text:span text:style-name="T1">Attempt to violate the constraints and observe the results:</text:span></text:p>
      <text:p text:style-name="Standard"><text:span text:style-name="T1"/></text:p>
      <text:p text:style-name="Standard"><text:span text:style-name="T1">1. Test 1: Insert a NULL value into a NOT NULL column.</text:span></text:p>
      <text:p text:style-name="Standard"><text:span text:style-name="T1">2. Test 2: Insert a duplicate value in the UNIQUE column.</text:span></text:p>
      <text:p text:style-name="Standard"><text:span text:style-name="T1">3. Test 3: Insert a record with an invalid FOREIGN KEY reference.</text:span></text:p>
      <text:p text:style-name="Standard"><draw:frame draw:style-name="fr7" draw:name="Image3" text:anchor-type="char" svg:width="20.869cm" svg:height="10.624cm" draw:z-index="2"><draw:image xlink:href="Pictures/10000201000005A000000384BC3A066CADABCE82.png" xlink:type="simple" xlink:show="embed" xlink:actuate="onLoad" loext:mime-type="image/png"/></draw:frame><text:span text:style-name="T1"/></text:p>
      <text:p text:style-name="Standard"><text:span text:style-name="T1"/></text:p>
      <text:p text:style-name="Standard"><text:span text:style-name="T1">5. Attempt following questions:</text:span></text:p>
      <text:p text:style-name="Standard"><text:span text:style-name="T1"/></text:p>
      <text:p text:style-name="Standard"><text:span text:style-name="T1">1. Write a query to display the names of students who were born after the year</text:span></text:p>
      <text:p text:style-name="Standard"><text:span text:style-name="T1">2000.</text:span></text:p>
      <text:p text:style-name="Standard"><draw:frame draw:style-name="fr6" draw:name="Image4" text:anchor-type="char" svg:x="-2cm" svg:y="0cm" svg:width="20.999cm" svg:height="4.577cm" draw:z-index="3"><draw:image xlink:href="Pictures/10000201000005A000000384EE3A51B789FD58DB.png" xlink:type="simple" xlink:show="embed" xlink:actuate="onLoad" loext:mime-type="image/png"/></draw:frame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2. Write a query to update the course credits for "Computer Science" to 4.</text:span></text:p>
      <text:p text:style-name="Standard"><draw:frame draw:style-name="fr5" draw:name="Image5" text:anchor-type="char" svg:width="20.877cm" svg:height="8.289cm" draw:z-index="4"><draw:image xlink:href="Pictures/10000201000005A000000384EE3A51B789FD58DB.png" xlink:type="simple" xlink:show="embed" xlink:actuate="onLoad" loext:mime-type="image/png"/></draw:frame><text:span text:style-name="T1"/></text:p>
      <text:p text:style-name="Standard"><text:span text:style-name="T1"/></text:p>
      <text:p text:style-name="Standard"><text:span text:style-name="T1">3. Write a query to delete a student record whose email is </text:span><text:a xlink:type="simple" xlink:href="mailto:'test@example.com" text:style-name="Internet_20_link" text:visited-style-name="Visited_20_Internet_20_Link"><text:span text:style-name="T1">'test@example.com</text:span></text:a><text:span text:style-name="T1">'.</text:span></text:p>
      <text:p text:style-name="Standard"><draw:frame draw:style-name="fr4" draw:name="Image6" text:anchor-type="char" svg:x="-2cm" svg:y="0.145cm" svg:width="21.001cm" svg:height="4.449cm" draw:z-index="5"><draw:image xlink:href="Pictures/10000201000005A000000384EE3A51B789FD58DB.png" xlink:type="simple" xlink:show="embed" xlink:actuate="onLoad" loext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4. Write a query to find students who are not enrolled in any course.</text:span></text:p>
      <text:p text:style-name="Standard"><draw:frame draw:style-name="fr3" draw:name="Image7" text:anchor-type="char" svg:x="-2cm" svg:y="0.318cm" svg:width="21.001cm" svg:height="2.032cm" draw:z-index="6"><draw:image xlink:href="Pictures/10000201000005A000000384F47D50380CE71632.png" xlink:type="simple" xlink:show="embed" xlink:actuate="onLoad" loext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>5. Test the UNIQUE constraint by inserting a duplicate email into the Students</text:span></text:p>
      <text:p text:style-name="Standard"><text:span text:style-name="T1">table</text:span></text:p>
      <text:p text:style-name="Standard"><draw:frame draw:style-name="fr2" draw:name="Image8" text:anchor-type="char" svg:x="-2.055cm" svg:y="0.072cm" svg:width="21.001cm" svg:height="3.228cm" draw:z-index="7"><draw:image xlink:href="Pictures/10000201000005A00000038427C8C479FC058527.png" xlink:type="simple" xlink:show="embed" xlink:actuate="onLoad" loext:mime-type="image/png"/></draw:frame><text:span text:style-name="T1"/></text:p>
      <text:p text:style-name="Standard"><text:span text:style-name="T1">6. Test the FOREIGN KEY constraint by inserting a student with a CourseID</text:span></text:p>
      <text:p text:style-name="Standard"><text:span text:style-name="T1">that does not exist in the Courses table</text:span></text:p>
      <text:p text:style-name="Standard"><draw:frame draw:style-name="fr1" draw:name="Image9" text:anchor-type="char" svg:x="-2cm" svg:y="0.473cm" svg:width="21.001cm" svg:height="5.613cm" draw:z-index="8"><draw:image xlink:href="Pictures/10000201000005A00000038427C8C479FC058527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4T09:34:23.607719587</meta:creation-date>
    <dc:date>2025-02-04T10:16:27.637995797</dc:date>
    <meta:editing-duration>PT1M10S</meta:editing-duration>
    <meta:editing-cycles>1</meta:editing-cycles>
    <meta:document-statistic meta:table-count="0" meta:image-count="9" meta:object-count="0" meta:page-count="4" meta:paragraph-count="31" meta:word-count="218" meta:character-count="1279" meta:non-whitespace-character-count="1087"/>
    <meta:generator>LibreOffice/6.4.7.2$Linux_X86_64 LibreOffice_project/40$Build-2</meta:generator>
  </office:meta>
</office:document-meta>
</file>