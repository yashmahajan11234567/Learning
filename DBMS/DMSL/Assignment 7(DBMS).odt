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8426F91660D6AA792F.png" manifest:media-type="image/png"/>
  <manifest:file-entry manifest:full-path="Pictures/1000020100000640000003845B923D23D19A6ECB.png" manifest:media-type="image/png"/>
  <manifest:file-entry manifest:full-path="Pictures/10000201000006400000038426FCBA10F986AB3F.png" manifest:media-type="image/png"/>
  <manifest:file-entry manifest:full-path="Pictures/100002010000064000000384CE5CDCA0E710AFA9.png" manifest:media-type="image/png"/>
  <manifest:file-entry manifest:full-path="Pictures/100002010000064000000384F917AF0D5833B036.png" manifest:media-type="image/png"/>
  <manifest:file-entry manifest:full-path="Pictures/100002010000064000000384A452E39AE7390975.png" manifest:media-type="image/png"/>
  <manifest:file-entry manifest:full-path="Pictures/100002010000064000000384A166E270F13A7E7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T1" style:family="text">
      <style:text-properties officeooo:rsid="001a7ecf"/>
    </style:style>
    <style:style style:name="T2" style:family="text">
      <style:text-properties fo:font-size="15pt" officeooo:rsid="001a7ecf" style:font-size-asian="15pt" style:font-size-complex="15pt"/>
    </style:style>
    <style:style style:name="T3" style:family="text">
      <style:text-properties fo:font-size="15pt" officeooo:rsid="001c59ca" style:font-size-asian="15pt" style:font-size-complex="1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9.793cm, 0cm, -0.004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4.587cm, 0cm, 3.791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9.647cm, 0cm, 9.158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7.328cm, 0cm, 4.085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2.91cm, 0cm, 6.549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8.23cm, 0cm, 10.767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15.84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15.318cm, 0cm, 3.152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9.98cm, 0cm, 8.035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3.752cm, 0cm, 13.301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cm, 0cm, 19.232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16.73cm, 0cm, -0.004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11.531cm, 0cm, 6.807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5.99cm, 0cm, 12.211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top" style:vertical-rel="paragraph" style:mirror="none" fo:clip="rect(0cm, 0cm, 17.685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from-left" style:horizontal-rel="paragraph" style:mirror="none" fo:clip="rect(18.307cm, 0cm, -0.004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from-top" style:vertical-rel="paragraph" style:horizontal-pos="from-left" style:horizontal-rel="paragraph" style:mirror="none" fo:clip="rect(11.652cm, 0cm, 5.368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from-top" style:vertical-rel="paragraph" style:horizontal-pos="from-left" style:horizontal-rel="paragraph" style:mirror="none" fo:clip="rect(9.414cm, 0cm, 12.083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vertical-pos="from-top" style:vertical-rel="paragraph" style:horizontal-pos="from-left" style:horizontal-rel="paragraph" style:mirror="none" fo:clip="rect(6.782cm, 0cm, 14.517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vertical-pos="from-top" style:vertical-rel="paragraph" style:horizontal-pos="from-left" style:horizontal-rel="paragraph" style:mirror="none" fo:clip="rect(0cm, 0cm, 16.828cm, 0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vertical-pos="from-top" style:vertical-rel="paragraph" style:horizontal-pos="from-left" style:horizontal-rel="paragraph" style:mirror="none" fo:clip="rect(0cm, 0cm, 0.891cm, 0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style:vertical-pos="from-top" style:vertical-rel="paragraph" style:horizontal-pos="from-left" style:horizontal-rel="paragraph" style:mirror="none" fo:clip="rect(2.425cm, 12.351cm, 1.125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span text:style-name="T1">Assignment 7(DBMS)<text:line-break/><text:line-break/><text:line-break/></text:span><text:span text:style-name="T2">TABLES:</text:span><draw:frame draw:style-name="fr22" draw:name="Image1" text:anchor-type="char" svg:x="-0.046cm" svg:y="3.293cm" svg:width="17.411cm" svg:height="9.499cm" draw:z-index="0"><draw:image xlink:href="Pictures/100002010000064000000384A166E270F13A7E79.png" xlink:type="simple" xlink:show="embed" xlink:actuate="onLoad" loext:mime-type="image/png"/></draw:frame><text:span text:style-name="T2"><text:line-break/><text:line-break/><text:line-break/>VALUES:<text:line-break/></text:span><draw:frame draw:style-name="fr21" draw:name="Image2" text:anchor-type="char" svg:x="0.079cm" svg:y="15.612cm" svg:width="17cm" svg:height="9.204cm" draw:z-index="1"><draw:image xlink:href="Pictures/100002010000064000000384A452E39AE7390975.png" xlink:type="simple" xlink:show="embed" xlink:actuate="onLoad" loext:mime-type="image/png"/></draw:frame><text:span text:style-name="T2"><text:line-break/><text:line-break/></text:span><text:soft-page-break/><text:span text:style-name="T2"><text:line-break/>QUERIES:<text:line-break/><text:line-break/>1. Find students who have a CGPA higher than the university average CGPA</text:span></text:p>
      <text:p text:style-name="P1"><draw:frame draw:style-name="fr20" draw:name="Image3" text:anchor-type="char" svg:x="-0.079cm" svg:y="0.674cm" svg:width="17cm" svg:height="2.805cm" draw:z-index="2"><draw:image xlink:href="Pictures/100002010000064000000384F917AF0D5833B036.png" xlink:type="simple" xlink:show="embed" xlink:actuate="onLoad" loext:mime-type="image/png"/></draw:frame><text:span text:style-name="T2"><text:line-break/><text:line-break/>2. Find students who have never enrolled in any course</text:span></text:p>
      <text:p text:style-name="P1"><text:span text:style-name="T2"/></text:p>
      <text:p text:style-name="P1"><draw:frame draw:style-name="fr19" draw:name="Image4" text:anchor-type="char" svg:x="-0.106cm" svg:y="0.051cm" svg:width="17cm" svg:height="1.009cm" draw:z-index="3"><draw:image xlink:href="Pictures/100002010000064000000384F917AF0D5833B036.png" xlink:type="simple" xlink:show="embed" xlink:actuate="onLoad" loext:mime-type="image/png"/></draw:frame><text:span text:style-name="T2"><text:line-break/>3. Get courses that have no students enrolled</text:span></text:p>
      <text:p text:style-name="P1"><draw:frame draw:style-name="fr18" draw:name="Image5" text:anchor-type="char" svg:x="0.026cm" svg:y="0.42cm" svg:width="17cm" svg:height="0.93cm" draw:z-index="4"><draw:image xlink:href="Pictures/100002010000064000000384F917AF0D5833B036.png" xlink:type="simple" xlink:show="embed" xlink:actuate="onLoad" loext:mime-type="image/png"/></draw:frame><text:span text:style-name="T2"/></text:p>
      <text:p text:style-name="P1"><text:span text:style-name="T2">4. Get students enrolled in courses offered by the 'Computer Sci' department<text:line-break/></text:span><draw:frame draw:style-name="fr17" draw:name="Image6" text:anchor-type="char" svg:x="-0.053cm" svg:y="1.24cm" svg:width="17cm" svg:height="2.727cm" draw:z-index="5"><draw:image xlink:href="Pictures/100002010000064000000384F917AF0D5833B036.png" xlink:type="simple" xlink:show="embed" xlink:actuate="onLoad" loext:mime-type="image/png"/></draw:frame></text:p>
      <text:p text:style-name="P1"><text:span text:style-name="T2">5. Find students who have the same age as the oldest student</text:span></text:p>
      <text:p text:style-name="P1"><draw:frame draw:style-name="fr16" draw:name="Image7" text:anchor-type="char" svg:x="0.067cm" svg:y="0.353cm" svg:width="17cm" svg:height="2.212cm" draw:z-index="6"><draw:image xlink:href="Pictures/100002010000064000000384F917AF0D5833B036.png" xlink:type="simple" xlink:show="embed" xlink:actuate="onLoad" loext:mime-type="image/png"/></draw:frame><text:span text:style-name="T2"/></text:p>
      <text:p text:style-name="P1"><text:span text:style-name="T2"><text:line-break/><text:line-break/>6. Retrieve courses where at least one student scored more than 85 marks</text:span></text:p>
      <text:p text:style-name="P1"><text:span text:style-name="T2"/></text:p>
      <text:p text:style-name="P1"><draw:frame draw:style-name="fr15" draw:name="Image8" text:anchor-type="char" svg:width="17cm" svg:height="2.461cm" draw:z-index="7"><draw:image xlink:href="Pictures/10000201000006400000038426FCBA10F986AB3F.png" xlink:type="simple" xlink:show="embed" xlink:actuate="onLoad" loext:mime-type="image/png"/></draw:frame><text:span text:style-name="T2"/></text:p>
      <text:p text:style-name="P1"><text:soft-page-break/><text:span text:style-name="T2"><text:line-break/>7. Find the highest CGPA in each department</text:span></text:p>
      <text:p text:style-name="P1"><text:span text:style-name="T2"/></text:p>
      <text:p text:style-name="P1"><draw:frame draw:style-name="fr14" draw:name="Image9" text:anchor-type="char" svg:x="-0.079cm" svg:y="0.127cm" svg:width="17cm" svg:height="2.252cm" draw:z-index="8"><draw:image xlink:href="Pictures/10000201000006400000038426FCBA10F986AB3F.png" xlink:type="simple" xlink:show="embed" xlink:actuate="onLoad" loext:mime-type="image/png"/></draw:frame><text:span text:style-name="T2"/></text:p>
      <text:p text:style-name="P1"><text:span text:style-name="T2">8. Get students who have enrolled in more than one course</text:span></text:p>
      <text:p text:style-name="P1"><draw:frame draw:style-name="fr13" draw:name="Image10" text:anchor-type="char" svg:x="0cm" svg:y="0.503cm" svg:width="17cm" svg:height="2.198cm" draw:z-index="9"><draw:image xlink:href="Pictures/10000201000006400000038426FCBA10F986AB3F.png" xlink:type="simple" xlink:show="embed" xlink:actuate="onLoad" loext:mime-type="image/png"/></draw:frame><text:span text:style-name="T2"/></text:p>
      <text:p text:style-name="P1"><text:span text:style-name="T2">9. Get the department with the most students enrolled</text:span></text:p>
      <text:p text:style-name="P1"><draw:frame draw:style-name="fr12" draw:name="Image11" text:anchor-type="char" svg:x="-0.106cm" svg:y="0.554cm" svg:width="17cm" svg:height="2.845cm" draw:z-index="10"><draw:image xlink:href="Pictures/10000201000006400000038426FCBA10F986AB3F.png" xlink:type="simple" xlink:show="embed" xlink:actuate="onLoad" loext:mime-type="image/png"/></draw:frame><text:span text:style-name="T2"/></text:p>
      <text:p text:style-name="P1"><text:span text:style-name="T2">10. Find students who are not enrolled in any course</text:span></text:p>
      <text:p text:style-name="P1"><draw:frame draw:style-name="fr11" draw:name="Image12" text:anchor-type="char" svg:x="0cm" svg:y="0.344cm" svg:width="17cm" svg:height="1.84cm" draw:z-index="11"><draw:image xlink:href="Pictures/100002010000064000000384CE5CDCA0E710AFA9.png" xlink:type="simple" xlink:show="embed" xlink:actuate="onLoad" loext:mime-type="image/png"/></draw:frame><text:span text:style-name="T2"/></text:p>
      <text:p text:style-name="P1"><text:span text:style-name="T2">11. Retrieve students who scored below the average marks in their courses</text:span></text:p>
      <text:p text:style-name="P1"><draw:frame draw:style-name="fr10" draw:name="Image13" text:anchor-type="char" svg:x="0cm" svg:y="0.527cm" svg:width="17cm" svg:height="2.715cm" draw:z-index="12"><draw:image xlink:href="Pictures/100002010000064000000384CE5CDCA0E710AFA9.png" xlink:type="simple" xlink:show="embed" xlink:actuate="onLoad" loext:mime-type="image/png"/></draw:frame><text:span text:style-name="T2"/></text:p>
      <text:p text:style-name="P1"><draw:frame draw:style-name="fr9" draw:name="Image14" text:anchor-type="char" svg:x="-0.159cm" svg:y="1.466cm" svg:width="17cm" svg:height="2.328cm" draw:z-index="13"><draw:image xlink:href="Pictures/100002010000064000000384CE5CDCA0E710AFA9.png" xlink:type="simple" xlink:show="embed" xlink:actuate="onLoad" loext:mime-type="image/png"/></draw:frame><text:span text:style-name="T2">12. Find the department where the highest CGPA student belongs</text:span></text:p>
      <text:p text:style-name="P1"><text:span text:style-name="T2"/></text:p>
      <text:p text:style-name="P1"><text:span text:style-name="T2"/></text:p>
      <text:p text:style-name="P1"><text:soft-page-break/><text:span text:style-name="T2">13. Find the department with the highest number of students enrolled</text:span></text:p>
      <text:p text:style-name="P1"><draw:frame draw:style-name="fr8" draw:name="Image15" text:anchor-type="char" svg:x="-0.159cm" svg:y="0.462cm" svg:width="17cm" svg:height="2.145cm" draw:z-index="14"><draw:image xlink:href="Pictures/100002010000064000000384CE5CDCA0E710AFA9.png" xlink:type="simple" xlink:show="embed" xlink:actuate="onLoad" loext:mime-type="image/png"/></draw:frame><text:span text:style-name="T2"/></text:p>
      <text:p text:style-name="P1"><text:span text:style-name="T2">14. Get courses where the lowest score is higher than 70</text:span></text:p>
      <text:p text:style-name="P1"><draw:frame draw:style-name="fr7" draw:name="Image16" text:anchor-type="char" svg:width="17cm" svg:height="3.201cm" draw:z-index="15"><draw:image xlink:href="Pictures/1000020100000640000003845B923D23D19A6ECB.png" xlink:type="simple" xlink:show="embed" xlink:actuate="onLoad" loext:mime-type="image/png"/></draw:frame><text:span text:style-name="T2"/></text:p>
      <text:p text:style-name="P1"><text:span text:style-name="T2">15. Retrieve students who have the same CGPA as '</text:span><text:span text:style-name="T3">Amit Patel</text:span><text:span text:style-name="T2">'</text:span></text:p>
      <text:p text:style-name="P1"><draw:frame draw:style-name="fr6" draw:name="Image17" text:anchor-type="char" svg:x="-0.291cm" svg:y="0.607cm" svg:width="17cm" svg:height="1.933cm" draw:z-index="16"><draw:image xlink:href="Pictures/1000020100000640000003845B923D23D19A6ECB.png" xlink:type="simple" xlink:show="embed" xlink:actuate="onLoad" loext:mime-type="image/png"/></draw:frame><text:span text:style-name="T2"/></text:p>
      <text:p text:style-name="P1"><text:span text:style-name="T2">16. Get the course where the maximum number of students have enrolled</text:span></text:p>
      <text:p text:style-name="P1"><draw:frame draw:style-name="fr5" draw:name="Image18" text:anchor-type="char" svg:x="-0.132cm" svg:y="0.263cm" svg:width="17cm" svg:height="1.748cm" draw:z-index="17"><draw:image xlink:href="Pictures/1000020100000640000003845B923D23D19A6ECB.png" xlink:type="simple" xlink:show="embed" xlink:actuate="onLoad" loext:mime-type="image/png"/></draw:frame><text:span text:style-name="T2"/></text:p>
      <text:p text:style-name="P1"><text:span text:style-name="T2">17. Find students who are enrolled in more than two courses</text:span></text:p>
      <text:p text:style-name="P1"><draw:frame draw:style-name="fr4" draw:name="Image19" text:anchor-type="char" svg:x="-0.026cm" svg:y="0.291cm" svg:width="17cm" svg:height="0.963cm" draw:z-index="18"><draw:image xlink:href="Pictures/1000020100000640000003845B923D23D19A6ECB.png" xlink:type="simple" xlink:show="embed" xlink:actuate="onLoad" loext:mime-type="image/png"/></draw:frame><text:span text:style-name="T2"/></text:p>
      <text:p text:style-name="P1"><text:span text:style-name="T2">18. Retrieve students who have scored the highest marks in any course(Hint: Use Join along with nested quesries).</text:span></text:p>
      <text:p text:style-name="P1"><draw:frame draw:style-name="fr3" draw:name="Image20" text:anchor-type="char" svg:x="0cm" svg:y="0.397cm" svg:width="17cm" svg:height="2.011cm" draw:z-index="19"><draw:image xlink:href="Pictures/10000201000006400000038426F91660D6AA792F.png" xlink:type="simple" xlink:show="embed" xlink:actuate="onLoad" loext:mime-type="image/png"/></draw:frame><text:span text:style-name="T2"/></text:p>
      <text:p text:style-name="P1"><text:span text:style-name="T2"/></text:p>
      <text:p text:style-name="P1"><text:span text:style-name="T2">19. Get the department with the lowest average CGPA</text:span><draw:frame draw:style-name="fr2" draw:name="Image21" text:anchor-type="char" svg:x="-0.095cm" svg:y="0.965cm" svg:width="17cm" svg:height="2.182cm" draw:z-index="20"><draw:image xlink:href="Pictures/10000201000006400000038426F91660D6AA792F.png" xlink:type="simple" xlink:show="embed" xlink:actuate="onLoad" loext:mime-type="image/png"/></draw:frame></text:p>
      <text:p text:style-name="P1"><text:soft-page-break/><text:span text:style-name="T2">20. Find the course in which the maximum number of students have failed (Marks &lt; 40)</text:span></text:p>
      <text:p text:style-name="P1"><draw:frame draw:style-name="fr1" draw:name="Image22" text:anchor-type="char" svg:x="0.053cm" svg:y="0.54cm" svg:width="17cm" svg:height="1.616cm" draw:z-index="21"><draw:image xlink:href="Pictures/10000201000006400000038426F91660D6AA792F.png" xlink:type="simple" xlink:show="embed" xlink:actuate="onLoad" loext:mime-type="image/png"/></draw:frame><text:span text:style-name="T2"/></text:p>
      <text:p text:style-name="P1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3-25T09:33:09.061288206</meta:creation-date>
    <dc:date>2025-03-25T09:57:51.771393439</dc:date>
    <meta:editing-duration>PT3M51S</meta:editing-duration>
    <meta:editing-cycles>1</meta:editing-cycles>
    <meta:document-statistic meta:table-count="0" meta:image-count="22" meta:object-count="0" meta:page-count="5" meta:paragraph-count="20" meta:word-count="232" meta:character-count="1342" meta:non-whitespace-character-count="1111"/>
    <meta:generator>LibreOffice/6.4.7.2$Linux_X86_64 LibreOffice_project/40$Build-2</meta:generator>
  </office:meta>
</office:document-meta>
</file>