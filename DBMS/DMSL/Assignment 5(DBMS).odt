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C5364E021FA19C1.png" manifest:media-type="image/png"/>
  <manifest:file-entry manifest:full-path="Pictures/100002010000064000000384B0A39DF77B0E856D.png" manifest:media-type="image/png"/>
  <manifest:file-entry manifest:full-path="Pictures/100002010000064000000384E2F3AEF1DC6DC016.png" manifest:media-type="image/png"/>
  <manifest:file-entry manifest:full-path="Pictures/1000020100000640000003846B3AAD0597DD1B6E.png" manifest:media-type="image/png"/>
  <manifest:file-entry manifest:full-path="Pictures/1000020100000640000003845541BF2F8F49D41B.png" manifest:media-type="image/png"/>
  <manifest:file-entry manifest:full-path="Pictures/10000201000006400000038491A3DC4E323A51A6.png" manifest:media-type="image/png"/>
  <manifest:file-entry manifest:full-path="Pictures/100002010000064000000384764AC4813E4C8F0E.png" manifest:media-type="image/png"/>
  <manifest:file-entry manifest:full-path="Pictures/1000020100000640000003840EB735585FDC2002.png" manifest:media-type="image/png"/>
  <manifest:file-entry manifest:full-path="Pictures/100002010000064000000384A86773CAC3069A9A.png" manifest:media-type="image/png"/>
  <manifest:file-entry manifest:full-path="Pictures/10000201000006400000038414FFCED49590B09F.png" manifest:media-type="image/png"/>
  <manifest:file-entry manifest:full-path="Pictures/1000020100000640000003847744DB9AA2B03C66.png" manifest:media-type="image/png"/>
  <manifest:file-entry manifest:full-path="Pictures/100002010000064000000384217BF4409838BE4F.png" manifest:media-type="image/png"/>
  <manifest:file-entry manifest:full-path="Pictures/10000201000006400000038469CDF158849A1862.png" manifest:media-type="image/png"/>
  <manifest:file-entry manifest:full-path="Pictures/100002010000064000000384C94E72A48D4B495A.png" manifest:media-type="image/png"/>
  <manifest:file-entry manifest:full-path="Pictures/1000020100000640000003848234676C0CF64A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f00a" officeooo:paragraph-rsid="000af00a" style:font-size-asian="18pt" style:font-size-complex="18pt"/>
    </style:style>
    <style:style style:name="P2" style:family="paragraph" style:parent-style-name="Standard">
      <style:text-properties fo:font-size="14pt" officeooo:rsid="000af00a" officeooo:paragraph-rsid="000af00a" style:font-size-asian="12.25pt" style:font-size-complex="14pt"/>
    </style:style>
    <style:style style:name="P3" style:family="paragraph" style:parent-style-name="Standard">
      <style:text-properties fo:font-size="14pt" officeooo:rsid="000af00a" officeooo:paragraph-rsid="000b2123" style:font-size-asian="12.25pt" style:font-size-complex="14pt"/>
    </style:style>
    <style:style style:name="T1" style:family="text">
      <style:text-properties officeooo:rsid="000b2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1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5.0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4.8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9.7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0.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0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029cm, 0cm, 4.8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268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802cm, 0cm, 1.46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11.64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5.88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4.3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7.55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cm, 0cm, 1.20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11.38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cm, 0cm, 7.52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1.696cm, 0cm, 2.297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12.0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ASSIGNMENT 5 (DBMS)</text:p>
      <text:p text:style-name="P1"/>
      <text:p text:style-name="P2">Customers</text:p>
      <text:p text:style-name="P2">customer_id (INT, PRIMARY KEY)</text:p>
      <text:p text:style-name="P2">name (VARCHAR)</text:p>
      <text:p text:style-name="P2">dob (DATE)</text:p>
      <text:p text:style-name="P2">city (VARCHAR)</text:p>
      <text:p text:style-name="P2">account_type (VARCHAR)</text:p>
      <text:p text:style-name="P2"/>
      <text:p text:style-name="P2">Accounts</text:p>
      <text:p text:style-name="P2">account_id (INT, PRIMARY KEY)</text:p>
      <text:p text:style-name="P2">customer_id (INT, FOREIGN KEY REFERENCES</text:p>
      <text:p text:style-name="P2">Customers(customer_id))</text:p>
      <text:p text:style-name="P2">balance (DECIMAL)</text:p>
      <text:p text:style-name="P2">account_type (VARCHAR)</text:p>
      <text:p text:style-name="P2">branch_id (INT, FOREIGN KEY REFERENCES Branches(branch_id))</text:p>
      <text:p text:style-name="P2"/>
      <text:p text:style-name="P2">Transactions</text:p>
      <text:p text:style-name="P2">transaction_id (INT, PRIMARY KEY)</text:p>
      <text:p text:style-name="P2">account_id (INT, FOREIGN KEY REFERENCES</text:p>
      <text:p text:style-name="P2">Accounts(account_id))</text:p>
      <text:p text:style-name="P2">amount (DECIMAL)</text:p>
      <text:p text:style-name="P2"/>
      <text:p text:style-name="P2">transaction_type (VARCHAR) -- (&amp;#39;Deposit&amp;#39;, &amp;#39;Withdrawal&amp;#39;,</text:p>
      <text:p text:style-name="P2">&amp;#39;Transfer&amp;#39;)</text:p>
      <text:p text:style-name="P2">transaction_date (DATE)</text:p>
      <text:p text:style-name="P2">Branches</text:p>
      <text:p text:style-name="P2">branch_id (INT, PRIMARY KEY)</text:p>
      <text:p text:style-name="P2">branch_name (VARCHAR)</text:p>
      <text:p text:style-name="P2">city (VARCHAR)</text:p>
      <text:p text:style-name="P2"/>
      <text:p text:style-name="P2">Loans</text:p>
      <text:p text:style-name="P2">loan_id (INT, PRIMARY KEY)</text:p>
      <text:p text:style-name="P2">customer_id (INT, FOREIGN KEY REFERENCES</text:p>
      <text:p text:style-name="P2">Customers(customer_id))</text:p>
      <text:p text:style-name="P2">amount (DECIMAL)</text:p>
      <text:p text:style-name="P2">loan_type (VARCHAR) -- (&amp;#39;Home&amp;#39;, &amp;#39;Car&amp;#39;, &amp;#39;Personal&amp;#39;)</text:p>
      <text:p text:style-name="P2">status (VARCHAR) -- (&amp;#39;Approved&amp;#39;, &amp;#39;Pending&amp;#39;, &amp;#39;Rejected&amp;#39;)</text:p>
      <text:p text:style-name="P2"/>
      <text:p text:style-name="P2"/>
      <text:p text:style-name="P2"/>
      <text:p text:style-name="P2"/>
      <text:p text:style-name="P2"><draw:frame draw:style-name="fr5" draw:name="Image14" text:anchor-type="char" svg:width="17cm" svg:height="5.265cm" draw:z-index="13"><draw:image xlink:href="Pictures/100002010000064000000384B0A39DF77B0E856D.png" xlink:type="simple" xlink:show="embed" xlink:actuate="onLoad" loext:mime-type="image/png"/></draw:frame><text:soft-page-break/></text:p>
      <text:p text:style-name="P2"/>
      <text:p text:style-name="P2"><draw:frame draw:style-name="fr4" draw:name="Image15" text:anchor-type="char" svg:width="17cm" svg:height="5.653cm" draw:z-index="14"><draw:image xlink:href="Pictures/100002010000064000000384A86773CAC3069A9A.png" xlink:type="simple" xlink:show="embed" xlink:actuate="onLoad" loext:mime-type="image/png"/></draw:frame></text:p>
      <text:p text:style-name="P2"/>
      <text:p text:style-name="P2"><draw:frame draw:style-name="fr3" draw:name="Image16" text:anchor-type="char" svg:width="17cm" svg:height="3.614cm" draw:z-index="15"><draw:image xlink:href="Pictures/1000020100000640000003845541BF2F8F49D41B.png" xlink:type="simple" xlink:show="embed" xlink:actuate="onLoad" loext:mime-type="image/png"/></draw:frame></text:p>
      <text:p text:style-name="P2"/>
      <text:p text:style-name="P2"><draw:frame draw:style-name="fr2" draw:name="Image17" text:anchor-type="char" svg:x="0cm" svg:y="0.794cm" svg:width="17cm" svg:height="3.526cm" draw:z-index="16"><draw:image xlink:href="Pictures/1000020100000640000003847744DB9AA2B03C66.png" xlink:type="simple" xlink:show="embed" xlink:actuate="onLoad" loext:mime-type="image/png"/></draw:frame></text:p>
      <text:p text:style-name="P2"/>
      <text:p text:style-name="P2"><draw:frame draw:style-name="fr1" draw:name="Image18" text:anchor-type="char" svg:x="0cm" svg:y="1.058cm" svg:width="17cm" svg:height="5.876cm" draw:z-index="17"><draw:image xlink:href="Pictures/10000201000006400000038491A3DC4E323A51A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Solve following queries :</text:p>
      <text:p text:style-name="P2">1. Retrieve the total balance for each account type.</text:p>
      <text:p text:style-name="P2"/>
      <text:p text:style-name="P3">CREATE VIEW total_balance_289 AS SELECT account_type, SUM(balance) AS total_balance FROM Accounts GROUP BY account_type; </text:p>
      <text:p text:style-name="P3">SELECT * FROM total_balance_289;</text:p>
      <text:p text:style-name="P2"><draw:frame draw:style-name="fr18" draw:name="Image1" text:anchor-type="char" svg:width="17cm" svg:height="4.711cm" draw:z-index="0"><draw:image xlink:href="Pictures/1000020100000640000003840EB735585FDC2002.png" xlink:type="simple" xlink:show="embed" xlink:actuate="onLoad" loext:mime-type="image/png"/></draw:frame></text:p>
      <text:p text:style-name="P2">2. Count the number of accounts in each branch.</text:p>
      <text:p text:style-name="P2"/>
      <text:p text:style-name="P3">CREATE VIEW account_count_289 AS SELECT branch_id, COUNT(account_id) AS account_count FROM Accounts GROUP BY branch_id; </text:p>
      <text:p text:style-name="P3">SELECT * FROM account_count_289;</text:p>
      <text:p text:style-name="P2"><draw:frame draw:style-name="fr17" draw:name="Image2" text:anchor-type="char" svg:x="0cm" svg:y="0.49cm" svg:width="17cm" svg:height="3.942cm" draw:z-index="1"><draw:image xlink:href="Pictures/1000020100000640000003840EB735585FDC2002.png" xlink:type="simple" xlink:show="embed" xlink:actuate="onLoad" loext:mime-type="image/png"/></draw:frame><text:soft-page-break/></text:p>
      <text:p text:style-name="P2"/>
      <text:p text:style-name="P2">3. Find the number of customers in each city.</text:p>
      <text:p text:style-name="P2"/>
      <text:p text:style-name="P3">CREATE VIEW customer_count_289 AS SELECT city, COUNT(customer_id) AS customer_count FROM Customers GROUP BY city; </text:p>
      <text:p text:style-name="P3">SELECT * FROM customer_count_289;</text:p>
      <text:p text:style-name="P2"/>
      <text:p text:style-name="P2"><draw:frame draw:style-name="fr16" draw:name="Image3" text:anchor-type="char" svg:width="17cm" svg:height="6.539cm" draw:z-index="2"><draw:image xlink:href="Pictures/100002010000064000000384764AC4813E4C8F0E.png" xlink:type="simple" xlink:show="embed" xlink:actuate="onLoad" loext:mime-type="image/png"/></draw:frame></text:p>
      <text:p text:style-name="P2">4. Show the number of loans approved per loan type.</text:p>
      <text:p text:style-name="P2"/>
      <text:p text:style-name="P2">CREATE VIEW approved_loans_289 AS SELECT loan_type, COUNT(loan_id) AS approved_loans FROM Loans WHERE status = 'Approved' GROUP BY loan_type; SELECT * FROM approved_loans_289;</text:p>
      <text:p text:style-name="P2"/>
      <text:p text:style-name="P2"><draw:frame draw:style-name="fr15" draw:name="Image4" text:anchor-type="char" svg:width="17cm" svg:height="4.988cm" draw:z-index="3"><draw:image xlink:href="Pictures/10000201000006400000038469CDF158849A1862.png" xlink:type="simple" xlink:show="embed" xlink:actuate="onLoad" loext:mime-type="image/png"/></draw:frame></text:p>
      <text:p text:style-name="P2">5. Find the total number of transactions for each transaction type.</text:p>
      <text:p text:style-name="P2"><text:soft-page-break/></text:p>
      <text:p text:style-name="P3">CREATE VIEW transaction_count_289 AS SELECT transaction_type, COUNT(transaction_id) AS transaction_count FROM Transactions GROUP BY transaction_type; </text:p>
      <text:p text:style-name="P3">SELECT * FROM transaction_count_289;</text:p>
      <text:p text:style-name="P2"><draw:frame draw:style-name="fr14" draw:name="Image5" text:anchor-type="char" svg:x="0.159cm" svg:y="0.557cm" svg:width="17cm" svg:height="4.26cm" draw:z-index="4"><draw:image xlink:href="Pictures/10000201000006400000038469CDF158849A1862.png" xlink:type="simple" xlink:show="embed" xlink:actuate="onLoad" loext:mime-type="image/png"/></draw:frame></text:p>
      <text:p text:style-name="P2"/>
      <text:p text:style-name="P2"/>
      <text:p text:style-name="P2">6. Show the customers who do not have a loan.</text:p>
      <text:p text:style-name="P2"/>
      <text:p text:style-name="P2">CREATE VIEW customers_without_loans_289 AS SELECT customer_id FROM Customers WHERE customer_id NOT IN (SELECT customer_id FROM Loans); SELECT * FROM customers_without_loans_289;</text:p>
      <text:p text:style-name="P2"><draw:frame draw:style-name="fr13" draw:name="Image6" text:anchor-type="char" svg:width="17cm" svg:height="6.526cm" draw:z-index="5"><draw:image xlink:href="Pictures/10000201000006400000038414FFCED49590B09F.png" xlink:type="simple" xlink:show="embed" xlink:actuate="onLoad" loext:mime-type="image/png"/></draw:frame></text:p>
      <text:p text:style-name="P2">7. Retrieve customers who have accounts in more than one branch.</text:p>
      <text:p text:style-name="P2"/>
      <text:p text:style-name="P3">CREATE VIEW customers_multiple_branches_289 AS SELECT customer_id FROM Accounts GROUP BY customer_id HAVING COUNT(DISTINCT branch_id) &gt; 1; </text:p>
      <text:p text:style-name="P3">SELECT * FROM customers_multiple_branches_289;</text:p>
      <text:p text:style-name="P2"/>
      <text:p text:style-name="P2"><draw:frame draw:style-name="fr12" draw:name="Image7" text:anchor-type="char" svg:width="17cm" svg:height="7.833cm" draw:z-index="6"><draw:image xlink:href="Pictures/100002010000064000000384E2F3AEF1DC6DC016.png" xlink:type="simple" xlink:show="embed" xlink:actuate="onLoad" loext:mime-type="image/png"/></draw:frame><text:soft-page-break/></text:p>
      <text:p text:style-name="P2">8. Find all accounts that have not had any deposits in the last 3 months.</text:p>
      <text:p text:style-name="P2"/>
      <text:p text:style-name="P3">CREATE VIEW accounts_no_deposits_289 AS SELECT account_id FROM Transactions WHERE transaction_type = 'Deposit' AND transaction_date &gt; CURRENT_DATE - INTERVAL 3 MONTH GROUP BY account_id HAVING COUNT(transaction_id) = 0; </text:p>
      <text:p text:style-name="P3">SELECT * FROM accounts_no_deposits_289;</text:p>
      <text:p text:style-name="P2"><draw:frame draw:style-name="fr11" draw:name="Image8" text:anchor-type="char" svg:width="17cm" svg:height="7.2cm" draw:z-index="7"><draw:image xlink:href="Pictures/100002010000064000000384C94E72A48D4B495A.png" xlink:type="simple" xlink:show="embed" xlink:actuate="onLoad" loext:mime-type="image/png"/></draw:frame></text:p>
      <text:p text:style-name="P2">9. Display the account types where the total balance is below ₹25,000.</text:p>
      <text:p text:style-name="P2"/>
      <text:p text:style-name="P3">CREATE VIEW account_types_below_25000_289 AS SELECT account_type, SUM(balance) AS total_balance FROM Accounts GROUP BY account_type HAVING SUM(balance) &lt; 25000; </text:p>
      <text:p text:style-name="P3">SELECT * FROM account_types_below_25000_289;</text:p>
      <text:p text:style-name="P2"/>
      <text:p text:style-name="P2"><draw:frame draw:style-name="fr10" draw:name="Image9" text:anchor-type="char" svg:width="17cm" svg:height="4.884cm" draw:z-index="8"><draw:image xlink:href="Pictures/100002010000064000000384217BF4409838BE4F.png" xlink:type="simple" xlink:show="embed" xlink:actuate="onLoad" loext:mime-type="image/png"/></draw:frame><text:soft-page-break/></text:p>
      <text:p text:style-name="P2">10. Find the total balance per account type where the balance is above ₹50,000.</text:p>
      <text:p text:style-name="P2"/>
      <text:p text:style-name="P3">CREATE VIEW account_types_above_50000_289 AS SELECT account_type, SUM(balance) AS total_balance FROM Accounts GROUP BY account_type HAVING SUM(balance) &gt; 50000; </text:p>
      <text:p text:style-name="P3">SELECT * FROM account_types_above_50000_289;</text:p>
      <text:p text:style-name="P2"/>
      <text:p text:style-name="P2"><draw:frame draw:style-name="fr9" draw:name="Image10" text:anchor-type="char" svg:x="-0.291cm" svg:y="-0.011cm" svg:width="17cm" svg:height="4.233cm" draw:z-index="9"><draw:image xlink:href="Pictures/100002010000064000000384217BF4409838BE4F.png" xlink:type="simple" xlink:show="embed" xlink:actuate="onLoad" loext:mime-type="image/png"/></draw:frame></text:p>
      <text:p text:style-name="P2"/>
      <text:p text:style-name="P2">11. Retrieve the count of transactions made on dates where more than 5 transactions</text:p>
      <text:p text:style-name="P2">occurred.</text:p>
      <text:p text:style-name="P2"/>
      <text:p text:style-name="P3">CREATE VIEW transactions_more_than_5_289 AS SELECT transaction_date, COUNT(transaction_id) AS transaction_count FROM Transactions GROUP BY transaction_date HAVING COUNT(transaction_id) &gt; 5; </text:p>
      <text:p text:style-name="P3">SELECT * FROM transactions_more_than_5_289;</text:p>
      <text:p text:style-name="P2"/>
      <text:p text:style-name="P2"><draw:frame draw:style-name="fr8" draw:name="Image11" text:anchor-type="char" svg:x="0cm" svg:y="0.467cm" svg:width="17cm" svg:height="4.637cm" draw:z-index="10"><draw:image xlink:href="Pictures/1000020100000640000003848234676C0CF64AC4.png" xlink:type="simple" xlink:show="embed" xlink:actuate="onLoad" loext:mime-type="image/png"/></draw:frame></text:p>
      <text:p text:style-name="P2"><text:soft-page-break/></text:p>
      <text:p text:style-name="P2">12. Find the top 3 transaction days with the highest total transaction amount.<text:span text:style-name="T1">\</text:span></text:p>
      <text:p text:style-name="P2"/>
      <text:p text:style-name="P3">CREATE VIEW top_3_transaction_days_289 AS SELECT transaction_date, SUM(amount) AS total_amount FROM Transactions GROUP BY transaction_date ORDER BY total_amount DESC LIMIT 3; </text:p>
      <text:p text:style-name="P3">SELECT * FROM top_3_transaction_days_289;</text:p>
      <text:p text:style-name="P2"/>
      <text:p text:style-name="P2"><draw:frame draw:style-name="fr7" draw:name="Image12" text:anchor-type="char" svg:x="-0.132cm" svg:y="0.235cm" svg:width="17cm" svg:height="4.392cm" draw:z-index="11"><draw:image xlink:href="Pictures/1000020100000640000003841C5364E021FA19C1.png" xlink:type="simple" xlink:show="embed" xlink:actuate="onLoad" loext:mime-type="image/png"/></draw:frame></text:p>
      <text:p text:style-name="P2">13. Find customers who have a loan but no account in the bank.</text:p>
      <text:p text:style-name="P2"><draw:frame draw:style-name="fr6" draw:name="Image13" text:anchor-type="char" svg:x="-0.026cm" svg:y="3.02cm" svg:width="17cm" svg:height="7.151cm" draw:z-index="12"><draw:image xlink:href="Pictures/1000020100000640000003846B3AAD0597DD1B6E.png" xlink:type="simple" xlink:show="embed" xlink:actuate="onLoad" loext:mime-type="image/png"/></draw:frame></text:p>
      <text:p text:style-name="P2">CREATE VIEW customers_with_loan_no_account_289 AS SELECT customer_id FROM Loans WHERE customer_id NOT IN (SELECT customer_id FROM Accounts); SELECT * FROM customers_with_loan_no_account_289;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0:28:43.493284524</meta:creation-date>
    <dc:date>2025-02-25T10:51:01.349353063</dc:date>
    <meta:editing-duration>PT22M16S</meta:editing-duration>
    <meta:editing-cycles>3</meta:editing-cycles>
    <meta:generator>LibreOffice/6.4.7.2$Linux_X86_64 LibreOffice_project/40$Build-2</meta:generator>
    <meta:document-statistic meta:table-count="0" meta:image-count="18" meta:object-count="0" meta:page-count="8" meta:paragraph-count="71" meta:word-count="522" meta:character-count="4221" meta:non-whitespace-character-count="3757"/>
  </office:meta>
</office:document-meta>
</file>