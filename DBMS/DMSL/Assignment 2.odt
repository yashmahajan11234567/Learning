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848D275417767BB4.png" manifest:media-type="image/png"/>
  <manifest:file-entry manifest:full-path="Pictures/10000201000005A000000384E6DCB51018534622.png" manifest:media-type="image/png"/>
  <manifest:file-entry manifest:full-path="Pictures/10000201000005A000000384A7CA45C29639903F.png" manifest:media-type="image/png"/>
  <manifest:file-entry manifest:full-path="Pictures/10000201000005A000000384ACC56F45D7760433.png" manifest:media-type="image/png"/>
  <manifest:file-entry manifest:full-path="Pictures/10000201000005A000000384FB390DBED2CF6D82.png" manifest:media-type="image/png"/>
  <manifest:file-entry manifest:full-path="Pictures/10000201000005A0000003842E44782FA8F2F07A.png" manifest:media-type="image/png"/>
  <manifest:file-entry manifest:full-path="Pictures/10000201000005A000000384A5C11655A0A745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499cm" loext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Preformatted_20_Text">
      <style:paragraph-properties fo:margin-top="0cm" fo:margin-bottom="0.499cm" loext:contextual-spacing="false" style:writing-mode="lr-tb"/>
      <style:text-properties officeooo:paragraph-rsid="000a8fe7"/>
    </style:style>
    <style:style style:name="T1" style:family="text">
      <style:text-properties officeooo:rsid="0009f316"/>
    </style:style>
    <style:style style:name="T2" style:family="text">
      <style:text-properties officeooo:rsid="000a8fe7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a8fe7" style:font-size-asian="14pt" style:font-size-complex="14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0a8fe7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978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969cm, 0cm, 3.7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545cm, 0cm, 5.5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475cm, 0cm, 9.8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41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038cm, 0cm, 10.90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603cm, 0cm, 6.34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5.65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427cm, 0cm, 5.86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666cm, 0cm, 10.98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507cm, 0cm, 15.85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7.341cm, 0cm, -0.00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9.781cm, 0cm, 5.7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3.848cm, 0cm, -0.00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7.495cm, -1.459cm, 7.183cm, -1.88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5.478cm, 0.004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2(DMSL)</text:span></text:p>
      <text:p text:style-name="Standard"/>
      <text:p text:style-name="Standard"><text:span text:style-name="Strong_20_Emphasis"/></text:p>
      <text:h text:style-name="Heading_20_3" text:outline-level="3">1. <text:span text:style-name="Strong_20_Emphasis">Create Students Table</text:span></text:h>
      <text:p text:style-name="Preformatted_20_Text"/>
      <text:p text:style-name="P2"><text:span text:style-name="Source_20_Text">CREATE TABLE Students (</text:span></text:p>
      <text:p text:style-name="P2"><text:span text:style-name="Source_20_Text"><text:s text:c="4"/>PRN INT PRIMARY KEY,</text:span></text:p>
      <text:p text:style-name="P2"><text:span text:style-name="Source_20_Text"><text:s text:c="4"/>FirstName VARCHAR(50) NOT NULL,</text:span></text:p>
      <text:p text:style-name="P2"><text:span text:style-name="Source_20_Text"><text:s text:c="4"/>LastName VARCHAR(50) NOT NULL,</text:span></text:p>
      <text:p text:style-name="P2"><text:span text:style-name="Source_20_Text"><text:s text:c="4"/>MiddleName VARCHAR(50) NULL,</text:span></text:p>
      <text:p text:style-name="P2"><text:span text:style-name="Source_20_Text"><text:s text:c="4"/>Year INT NOT NULL,</text:span></text:p>
      <text:p text:style-name="P2"><text:span text:style-name="Source_20_Text"><text:s text:c="4"/>Email VARCHAR(100) UNIQUE,</text:span></text:p>
      <text:p text:style-name="P2"><text:span text:style-name="Source_20_Text"><text:s text:c="4"/>Age INT NOT NULL,</text:span></text:p>
      <text:p text:style-name="P2"><text:span text:style-name="Source_20_Text"><text:s text:c="4"/>Department VARCHAR(100) NOT NULL</text:span></text:p>
      <text:p text:style-name="P3"><text:span text:style-name="Source_20_Text">);</text:span></text:p>
      <text:h text:style-name="Heading_20_3" text:outline-level="3">2. <text:span text:style-name="Strong_20_Emphasis">Insert Records into Students Table</text:span></text:h>
      <text:p text:style-name="Preformatted_20_Text"/>
      <text:p text:style-name="P2"><text:span text:style-name="Source_20_Text">INSERT INTO Students (PRN, FirstName, LastName, MiddleName, Year, Email, Age, Department)</text:span></text:p>
      <text:p text:style-name="P2"><text:span text:style-name="Source_20_Text">VALUES</text:span></text:p>
      <text:p text:style-name="P2"><text:span text:style-name="Source_20_Text">(101, 'John', 'Doe', 'A.', 2, 'john.doe@example.com', 20, 'Computer Science'),</text:span></text:p>
      <text:p text:style-name="P2"><text:span text:style-name="Source_20_Text">(102, 'Jane', 'Smith', 'B.', 1, 'jane.smith@example.com', 19, 'Electronics'),</text:span></text:p>
      <text:p text:style-name="P2"><text:span text:style-name="Source_20_Text">(103, 'Alice', 'Johnson', NULL, 3, 'alice.johnson@example.com', 21, 'Mechanical'),</text:span></text:p>
      <text:p text:style-name="P2"><text:span text:style-name="Source_20_Text">(104, 'Brod', 'Stud', 'B', 2, 'Brod.a@example.com', 20, 'Electronics'),</text:span></text:p>
      <text:p text:style-name="P2"><text:span text:style-name="Source_20_Text">(105, 'Mark', 'Taylor', NULL, 1, 'mark.taylor@example.com', 18, 'Computer Science'),</text:span></text:p>
      <text:p text:style-name="P3"><text:span text:style-name="Source_20_Text">(106, 'Emma', 'Clark', 'C.', 3, 'emma.clark@example.com', 22, 'Mechanical');</text:span></text:p>
      <text:h text:style-name="Heading_20_3" text:outline-level="3">3. <text:span text:style-name="Strong_20_Emphasis">Retrieve All Records from Students Table</text:span></text:h>
      <text:p text:style-name="Preformatted_20_Text"/>
      <text:p text:style-name="P3"><text:span text:style-name="Source_20_Text">SELECT * FROM Students;</text:span></text:p>
      <text:p text:style-name="P3"><draw:frame draw:style-name="fr16" draw:name="Image1" text:anchor-type="char" svg:x="-2cm" svg:y="-0.372cm" svg:width="21.001cm" svg:height="4.597cm" draw:z-index="0"><draw:image xlink:href="Pictures/10000201000005A000000384A5C11655A0A74595.png" xlink:type="simple" xlink:show="embed" xlink:actuate="onLoad" loext:mime-type="image/png"/></draw:frame><text:span text:style-name="Source_20_Text"><text:tab/><text:tab/><text:tab/><text:tab/><text:tab/><text:tab/><text:tab/><text:tab/><text:tab/><text:tab/><text:tab/><text:tab/><text:tab/></text:span></text:p>
      <text:h text:style-name="P1" text:outline-level="3"><text:span text:style-name="Source_20_Text">4. </text:span><text:span text:style-name="Source_20_Text"><text:span text:style-name="Strong_20_Emphasis">Update Year of Student with PRN 102</text:span></text:span></text:h>
      <text:p text:style-name="P2"><text:span text:style-name="Source_20_Text">UPDATE Students</text:span></text:p>
      <text:p text:style-name="P2"><text:span text:style-name="Source_20_Text">SET Year = 2</text:span></text:p>
      <text:p text:style-name="P3"><text:span text:style-name="Source_20_Text">WHERE PRN = 102;</text:span></text:p>
      <text:p text:style-name="P3"><draw:frame draw:style-name="fr15" draw:name="Image2" text:anchor-type="char" svg:x="-2cm" svg:y="-0.326cm" svg:width="21.001cm" svg:height="4.075cm" draw:z-index="1"><draw:image xlink:href="Pictures/10000201000005A0000003842E44782FA8F2F07A.png" xlink:type="simple" xlink:show="embed" xlink:actuate="onLoad" loext:mime-type="image/png"/></draw:frame><text:soft-page-break/><text:span text:style-name="Source_20_Text"><text:s text:c="107"/><text:tab/></text:span></text:p>
      <text:h text:style-name="Heading_20_3" text:outline-level="3">5. <text:span text:style-name="Strong_20_Emphasis">Delete Record of Student with PRN 103</text:span></text:h>
      <text:p text:style-name="Preformatted_20_Text"/>
      <text:p text:style-name="P2"><text:span text:style-name="Source_20_Text">DELETE FROM Students</text:span></text:p>
      <text:p text:style-name="P3"><text:span text:style-name="Source_20_Text">WHERE PRN = 103;</text:span></text:p>
      <text:p text:style-name="P3"><draw:frame draw:style-name="fr14" draw:name="Image3" text:anchor-type="char" svg:x="-2cm" svg:y="-0.175cm" svg:width="21.001cm" svg:height="5.493cm" draw:z-index="2"><draw:image xlink:href="Pictures/10000201000005A000000384FB390DBED2CF6D82.png" xlink:type="simple" xlink:show="embed" xlink:actuate="onLoad" loext:mime-type="image/png"/></draw:frame><text:span text:style-name="Source_20_Text"><text:tab/><text:tab/><text:tab/><text:tab/><text:tab/><text:tab/><text:tab/><text:tab/><text:tab/><text:tab/><text:tab/><text:tab/><text:tab/>7. </text:span><text:span text:style-name="Source_20_Text"><text:span text:style-name="T6">6.</text:span></text:span><text:span text:style-name="Source_20_Text"><text:span text:style-name="Strong_20_Emphasis"><text:span text:style-name="T5">Alter Students Table - Add PhoneNumber Column</text:span></text:span></text:span></text:p>
      <text:p text:style-name="Preformatted_20_Text"/>
      <text:p text:style-name="P2"><text:span text:style-name="Source_20_Text">ALTER TABLE Students</text:span></text:p>
      <text:p text:style-name="P3"><text:span text:style-name="Source_20_Text">ADD COLUMN PhoneNumber VARCHAR(15);</text:span></text:p>
      <text:p text:style-name="P4"><draw:frame draw:style-name="fr13" draw:name="Image4" text:anchor-type="char" svg:x="-2cm" svg:y="-0.258cm" svg:width="21.001cm" svg:height="4.546cm" draw:z-index="3"><draw:image xlink:href="Pictures/10000201000005A000000384ACC56F45D7760433.png" xlink:type="simple" xlink:show="embed" xlink:actuate="onLoad" loext:mime-type="image/png"/></draw:frame><text:span text:style-name="Source_20_Text"><text:tab/><text:tab/><text:tab/><text:tab/><text:tab/><text:tab/><text:tab/><text:tab/><text:tab/><text:tab/><text:tab/><text:tab/></text:span></text:p>
      <text:p text:style-name="P4"><text:span text:style-name="Source_20_Text"><text:span text:style-name="T4">7.</text:span></text:span><text:span text:style-name="Source_20_Text"><text:span text:style-name="Strong_20_Emphasis"><text:span text:style-name="T3">Retrieve All Distinct Departments</text:span></text:span></text:span></text:p>
      <text:p text:style-name="P3"><text:span text:style-name="Source_20_Text">SELECT DISTINCT Department FROM Students;</text:span></text:p>
      <text:p text:style-name="P3"><draw:frame draw:style-name="fr12" draw:name="Image5" text:anchor-type="char" svg:x="-2cm" svg:y="1.011cm" svg:width="21.001cm" svg:height="3.568cm" draw:z-index="4"><draw:image xlink:href="Pictures/10000201000005A000000384ACC56F45D7760433.png" xlink:type="simple" xlink:show="embed" xlink:actuate="onLoad" loext:mime-type="image/png"/></draw:frame><text:span text:style-name="Source_20_Text"/></text:p>
      <text:h text:style-name="P1" text:outline-level="3"><text:soft-page-break/><text:span text:style-name="Source_20_Text"><text:span text:style-name="T2">8</text:span></text:span><text:span text:style-name="Source_20_Text">. </text:span><text:span text:style-name="Source_20_Text"><text:span text:style-name="Strong_20_Emphasis">Find Number of Distinct Departments</text:span></text:span></text:h>
      <text:p text:style-name="Preformatted_20_Text"/>
      <text:p text:style-name="P2"><text:span text:style-name="Source_20_Text">SELECT COUNT(DISTINCT Department) AS DistinctDepartments</text:span></text:p>
      <text:p text:style-name="P3"><text:span text:style-name="Source_20_Text">FROM Students;</text:span></text:p>
      <text:p text:style-name="P3"><draw:frame draw:style-name="fr11" draw:name="Image6" text:anchor-type="char" svg:x="-2cm" svg:y="-0.182cm" svg:width="21.001cm" svg:height="2.452cm" draw:z-index="5"><draw:image xlink:href="Pictures/10000201000005A000000384A7CA45C29639903F.png" xlink:type="simple" xlink:show="embed" xlink:actuate="onLoad" loext:mime-type="image/png"/></draw:frame><text:span text:style-name="Source_20_Text"/></text:p>
      <text:h text:style-name="P1" text:outline-level="3"><text:span text:style-name="Source_20_Text"><text:span text:style-name="T2">9</text:span></text:span><text:span text:style-name="Source_20_Text">. </text:span><text:span text:style-name="Source_20_Text"><text:span text:style-name="Strong_20_Emphasis">Retrieve Distinct Years in which Students are Enrolled</text:span></text:span></text:h>
      <text:p text:style-name="P3"><text:span text:style-name="Source_20_Text">SELECT DISTINCT Year FROM Students;</text:span></text:p>
      <text:h text:style-name="P1" text:outline-level="3"><draw:frame draw:style-name="fr10" draw:name="Image7" text:anchor-type="char" svg:x="-2cm" svg:y="-0.296cm" svg:width="21.001cm" svg:height="2.845cm" draw:z-index="6"><draw:image xlink:href="Pictures/10000201000005A000000384A7CA45C29639903F.png" xlink:type="simple" xlink:show="embed" xlink:actuate="onLoad" loext:mime-type="image/png"/></draw:frame><text:span text:style-name="Source_20_Text"/></text:h>
      <text:h text:style-name="P1" text:outline-level="3"><text:span text:style-name="Source_20_Text">1</text:span><text:span text:style-name="Source_20_Text"><text:span text:style-name="T2">0</text:span></text:span><text:span text:style-name="Source_20_Text">. </text:span><text:span text:style-name="Source_20_Text"><text:span text:style-name="Strong_20_Emphasis">Retrieve All Distinct Ages of Students in "Computer Science" Department</text:span></text:span></text:h>
      <text:p text:style-name="Preformatted_20_Text"/>
      <text:p text:style-name="P2"><text:span text:style-name="Source_20_Text">SELECT DISTINCT Age</text:span></text:p>
      <text:p text:style-name="P2"><text:span text:style-name="Source_20_Text">FROM Students</text:span></text:p>
      <text:p text:style-name="P3"><text:span text:style-name="Source_20_Text">WHERE Department = 'Computer Science';</text:span></text:p>
      <text:p text:style-name="P3"><draw:frame draw:style-name="fr9" draw:name="Image8" text:anchor-type="char" svg:x="-2cm" svg:y="-0.356cm" svg:width="21.001cm" svg:height="3.041cm" draw:z-index="7"><draw:image xlink:href="Pictures/10000201000005A000000384A7CA45C29639903F.png" xlink:type="simple" xlink:show="embed" xlink:actuate="onLoad" loext:mime-type="image/png"/></draw:frame><text:span text:style-name="Source_20_Text"/></text:p>
      <text:h text:style-name="P1" text:outline-level="3"><text:span text:style-name="Source_20_Text">1</text:span><text:span text:style-name="Source_20_Text"><text:span text:style-name="T2">1</text:span></text:span><text:span text:style-name="Source_20_Text">. </text:span><text:span text:style-name="Source_20_Text"><text:span text:style-name="Strong_20_Emphasis">Retrieve Distinct First Names of Students whose Age is Less than 21</text:span></text:span></text:h>
      <text:p text:style-name="Preformatted_20_Text"/>
      <text:p text:style-name="P2"><text:span text:style-name="Source_20_Text">SELECT DISTINCT FirstName</text:span></text:p>
      <text:p text:style-name="P2"><text:span text:style-name="Source_20_Text">FROM Students</text:span></text:p>
      <text:p text:style-name="P3"><draw:frame draw:style-name="fr8" draw:name="Image9" text:anchor-type="char" svg:x="-2.238cm" svg:y="0.503cm" svg:width="21.001cm" svg:height="4.496cm" draw:z-index="8"><draw:image xlink:href="Pictures/10000201000005A000000384E6DCB51018534622.png" xlink:type="simple" xlink:show="embed" xlink:actuate="onLoad" loext:mime-type="image/png"/></draw:frame><text:span text:style-name="Source_20_Text">WHERE Age &lt; 21;</text:span></text:p>
      <text:p text:style-name="P3"><text:soft-page-break/><text:span text:style-name="Source_20_Text"/></text:p>
      <text:h text:style-name="P1" text:outline-level="3"><text:span text:style-name="Source_20_Text">1</text:span><text:span text:style-name="Source_20_Text"><text:span text:style-name="T2">2</text:span></text:span><text:span text:style-name="Source_20_Text">. </text:span><text:span text:style-name="Source_20_Text"><text:span text:style-name="Strong_20_Emphasis">Retrieve Full Details of Students Older than 20 Years</text:span></text:span></text:h>
      <text:p text:style-name="Preformatted_20_Text"/>
      <text:p text:style-name="P2"><text:span text:style-name="Source_20_Text">SELECT *</text:span></text:p>
      <text:p text:style-name="P2"><text:span text:style-name="Source_20_Text">FROM Students</text:span></text:p>
      <text:p text:style-name="P3"><text:span text:style-name="Source_20_Text">WHERE Age &gt; 20;</text:span></text:p>
      <text:p text:style-name="P3"><draw:frame draw:style-name="fr6" draw:name="Image11" text:anchor-type="char" svg:x="-2cm" svg:y="-0.462cm" svg:width="21.001cm" svg:height="2.681cm" draw:z-index="10"><draw:image xlink:href="Pictures/10000201000005A000000384E6DCB51018534622.png" xlink:type="simple" xlink:show="embed" xlink:actuate="onLoad" loext:mime-type="image/png"/></draw:frame><text:span text:style-name="Source_20_Text"/></text:p>
      <text:h text:style-name="P1" text:outline-level="3"><text:span text:style-name="Source_20_Text">1</text:span><text:span text:style-name="Source_20_Text"><text:span text:style-name="T2">3</text:span></text:span><text:span text:style-name="Source_20_Text">. </text:span><text:span text:style-name="Source_20_Text"><text:span text:style-name="Strong_20_Emphasis">Retrieve All Students Enrolled in their Third Year</text:span></text:span></text:h>
      <text:p text:style-name="Preformatted_20_Text"/>
      <text:p text:style-name="P2"><text:span text:style-name="Source_20_Text">SELECT *</text:span></text:p>
      <text:p text:style-name="P2"><text:span text:style-name="Source_20_Text">FROM Students</text:span></text:p>
      <text:p text:style-name="P3"><text:span text:style-name="Source_20_Text">WHERE Year = 3;</text:span></text:p>
      <text:h text:style-name="P1" text:outline-level="3"><draw:frame draw:style-name="fr7" draw:name="Image10" text:anchor-type="char" svg:x="-2cm" svg:y="-0.42cm" svg:width="21.001cm" svg:height="2.683cm" draw:z-index="9"><draw:image xlink:href="Pictures/10000201000005A000000384E6DCB51018534622.png" xlink:type="simple" xlink:show="embed" xlink:actuate="onLoad" loext:mime-type="image/png"/></draw:frame><text:span text:style-name="Source_20_Text"/></text:h>
      <text:h text:style-name="P1" text:outline-level="3"><text:span text:style-name="Source_20_Text">1</text:span><text:span text:style-name="Source_20_Text"><text:span text:style-name="T2">4</text:span></text:span><text:span text:style-name="Source_20_Text">. </text:span><text:span text:style-name="Source_20_Text"><text:span text:style-name="Strong_20_Emphasis">Retrieve First and Last Names with Department for Students with PRN Greater than 101</text:span></text:span></text:h>
      <text:p text:style-name="Preformatted_20_Text"/>
      <text:p text:style-name="P2"><text:span text:style-name="Source_20_Text">SELECT FirstName, LastName, Department</text:span></text:p>
      <text:p text:style-name="P2"><text:span text:style-name="Source_20_Text">FROM Students</text:span></text:p>
      <text:p text:style-name="P3"><text:span text:style-name="Source_20_Text">WHERE PRN &gt; 101;</text:span></text:p>
      <text:p text:style-name="P3"><draw:frame draw:style-name="fr5" draw:name="Image12" text:anchor-type="char" svg:x="-1.97cm" svg:y="-0.489cm" svg:width="20.969cm" svg:height="4.621cm" draw:z-index="11"><draw:image xlink:href="Pictures/10000201000005A000000384848D275417767BB4.png" xlink:type="simple" xlink:show="embed" xlink:actuate="onLoad" loext:mime-type="image/png"/></draw:frame><text:span text:style-name="Source_20_Text"/></text:p>
      <text:h text:style-name="P1" text:outline-level="3"><text:span text:style-name="Source_20_Text"/></text:h>
      <text:h text:style-name="P1" text:outline-level="3"><text:span text:style-name="Source_20_Text">1</text:span><text:span text:style-name="Source_20_Text"><text:span text:style-name="T2">5</text:span></text:span><text:span text:style-name="Source_20_Text">. </text:span><text:span text:style-name="Source_20_Text"><text:span text:style-name="Strong_20_Emphasis">Fetch First Names and Email Addresses of All Students in "Electronics" Department</text:span></text:span></text:h>
      <text:p text:style-name="Preformatted_20_Text"/>
      <text:p text:style-name="P2"><text:soft-page-break/><text:span text:style-name="Source_20_Text">SELECT FirstName, Email</text:span></text:p>
      <text:p text:style-name="P2"><text:span text:style-name="Source_20_Text">FROM Students</text:span></text:p>
      <text:p text:style-name="P3"><text:span text:style-name="Source_20_Text">WHERE Department = 'Electronics';</text:span></text:p>
      <text:p text:style-name="P3"><draw:frame draw:style-name="fr4" draw:name="Image13" text:anchor-type="char" svg:x="-2cm" svg:y="-0.319cm" svg:width="21.001cm" svg:height="3.007cm" draw:z-index="12"><draw:image xlink:href="Pictures/10000201000005A000000384848D275417767BB4.png" xlink:type="simple" xlink:show="embed" xlink:actuate="onLoad" loext:mime-type="image/png"/></draw:frame><text:span text:style-name="Source_20_Text"/></text:p>
      <text:h text:style-name="P1" text:outline-level="3"><text:span text:style-name="Source_20_Text">1</text:span><text:span text:style-name="Source_20_Text"><text:span text:style-name="T2">6</text:span></text:span><text:span text:style-name="Source_20_Text">. </text:span><text:span text:style-name="Source_20_Text"><text:span text:style-name="Strong_20_Emphasis">Fetch Details of Students in "Computer Science" Department who are Older than 19</text:span></text:span></text:h>
      <text:p text:style-name="Preformatted_20_Text"/>
      <text:p text:style-name="P2"><text:span text:style-name="Source_20_Text">SELECT *</text:span></text:p>
      <text:p text:style-name="P2"><text:span text:style-name="Source_20_Text">FROM Students</text:span></text:p>
      <text:p text:style-name="P3"><text:span text:style-name="Source_20_Text">WHERE Department = 'Computer Science' AND Age &gt; 19;</text:span></text:p>
      <text:p text:style-name="P3"><draw:frame draw:style-name="fr3" draw:name="Image14" text:anchor-type="char" svg:x="-2cm" svg:y="-0.307cm" svg:width="21.001cm" svg:height="2.618cm" draw:z-index="13"><draw:image xlink:href="Pictures/10000201000005A000000384848D275417767BB4.png" xlink:type="simple" xlink:show="embed" xlink:actuate="onLoad" loext:mime-type="image/png"/></draw:frame><text:span text:style-name="Source_20_Text"/></text:p>
      <text:h text:style-name="P1" text:outline-level="3"><text:span text:style-name="Source_20_Text">1</text:span><text:span text:style-name="Source_20_Text"><text:span text:style-name="T2">7</text:span></text:span><text:span text:style-name="Source_20_Text">. </text:span><text:span text:style-name="Source_20_Text"><text:span text:style-name="Strong_20_Emphasis">Remove All Records from Students Table (without deleting the table)</text:span></text:span></text:h>
      <text:p text:style-name="Preformatted_20_Text"/>
      <text:p text:style-name="P3"><text:span text:style-name="Source_20_Text">DELETE FROM Students;</text:span></text:p>
      <text:p text:style-name="P3"><draw:frame draw:style-name="fr2" draw:name="Image15" text:anchor-type="char" svg:x="-2cm" svg:y="-0.138cm" svg:width="21.001cm" svg:height="1.147cm" draw:z-index="14"><draw:image xlink:href="Pictures/10000201000005A000000384848D275417767BB4.png" xlink:type="simple" xlink:show="embed" xlink:actuate="onLoad" loext:mime-type="image/png"/></draw:frame><text:span text:style-name="Source_20_Text"/></text:p>
      <text:p text:style-name="P3"><text:span text:style-name="Source_20_Text"/></text:p>
      <text:h text:style-name="P1" text:outline-level="3"><text:span text:style-name="Source_20_Text">1</text:span><text:span text:style-name="Source_20_Text"><text:span text:style-name="T2">8</text:span></text:span><text:span text:style-name="Source_20_Text">. </text:span><text:span text:style-name="Source_20_Text"><text:span text:style-name="Strong_20_Emphasis">Drop the Students Table</text:span></text:span></text:h>
      <text:p text:style-name="Preformatted_20_Text"/>
      <text:p text:style-name="P3"><draw:frame draw:style-name="fr1" draw:name="Image16" text:anchor-type="char" svg:x="-2cm" svg:y="0.788cm" svg:width="21.001cm" svg:height="2.117cm" draw:z-index="15"><draw:image xlink:href="Pictures/10000201000005A000000384848D275417767BB4.png" xlink:type="simple" xlink:show="embed" xlink:actuate="onLoad" loext:mime-type="image/png"/></draw:frame><text:span text:style-name="Source_20_Text">DROP TABLE Students;</text:span></text:p>
      <text:p text:style-name="P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3T14:56:04.244472567</meta:creation-date>
    <dc:date>2025-02-03T15:32:58.555691848</dc:date>
    <meta:editing-duration>PT5M5S</meta:editing-duration>
    <meta:editing-cycles>1</meta:editing-cycles>
    <meta:generator>LibreOffice/6.4.7.2$Linux_X86_64 LibreOffice_project/40$Build-2</meta:generator>
    <meta:document-statistic meta:table-count="0" meta:image-count="16" meta:object-count="0" meta:page-count="5" meta:paragraph-count="75" meta:word-count="378" meta:character-count="2712" meta:non-whitespace-character-count="2223"/>
  </office:meta>
</office:document-meta>
</file>