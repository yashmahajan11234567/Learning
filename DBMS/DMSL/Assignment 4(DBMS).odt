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9EAD63636CB63246.png" manifest:media-type="image/png"/>
  <manifest:file-entry manifest:full-path="Pictures/100002010000064000000384EEFE25D327D6D8C8.png" manifest:media-type="image/png"/>
  <manifest:file-entry manifest:full-path="Pictures/100002010000064000000384D98D24EFD5465804.png" manifest:media-type="image/png"/>
  <manifest:file-entry manifest:full-path="Pictures/1000020100000640000003840F2876BE928F9EA6.png" manifest:media-type="image/png"/>
  <manifest:file-entry manifest:full-path="Pictures/1000020100000640000003842579F13FD1576389.png" manifest:media-type="image/png"/>
  <manifest:file-entry manifest:full-path="Pictures/1000020100000640000003848A0D8AB82C7C4AB2.png" manifest:media-type="image/png"/>
  <manifest:file-entry manifest:full-path="Pictures/100002010000064000000384AC36E569AF0E0C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6c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594cm, 0cm, 3.62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129cm, 0cm, 1.3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037cm, 0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9.701cm, 0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729cm, 0cm, 9.68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16.38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691cm, 0cm, 8.41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15.79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4.189cm, 0cm, 3.42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8.241cm, 0cm, 9.83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15.50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4.266cm, 0cm, 2.69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7.705cm, 0cm, 9.31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16.00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4.004cm, 0cm, 3.67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7.348cm, 0cm, 9.874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mirror="none" fo:clip="rect(0cm, 0cm, 15.704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2.303cm, 0cm, 4.129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6.839cm, 0cm, 11.301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mirror="none" fo:clip="rect(0cm, 0cm, 16.75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DBMS ASSIGNMENT 4</text:span></text:p>
      <text:p text:style-name="Standard"/>
      <text:p text:style-name="Standard"/>
      <text:p text:style-name="Standard">1. Customers : Stores customer details.</text:p>
      <text:p text:style-name="Standard">CREATE TABLE Customers (</text:p>
      <text:p text:style-name="Standard">customer_id INT PRIMARY KEY,</text:p>
      <text:p text:style-name="Standard">name VARCHAR(50),</text:p>
      <text:p text:style-name="Standard">email VARCHAR(100),</text:p>
      <text:p text:style-name="Standard">city VARCHAR(50),</text:p>
      <text:p text:style-name="Standard">age INT</text:p>
      <text:p text:style-name="Standard">);</text:p>
      <text:p text:style-name="Standard">2. Orders :Stores order details placed by customers.</text:p>
      <text:p text:style-name="Standard">CREATE TABLE Orders (</text:p>
      <text:p text:style-name="Standard">order_id INT PRIMARY KEY,</text:p>
      <text:p text:style-name="Standard">customer_id INT,</text:p>
      <text:p text:style-name="Standard">order_date DATE,</text:p>
      <text:p text:style-name="Standard">total_amount DECIMAL(10,2),</text:p>
      <text:p text:style-name="Standard">status VARCHAR(20),</text:p>
      <text:p text:style-name="Standard">FOREIGN KEY (customer_id) REFERENCES Customers(customer_id)</text:p>
      <text:p text:style-name="Standard">);</text:p>
      <text:p text:style-name="Standard">3. Products : Stores product details.</text:p>
      <text:p text:style-name="Standard">CREATE TABLE Products (</text:p>
      <text:p text:style-name="Standard">product_id INT PRIMARY KEY,</text:p>
      <text:p text:style-name="Standard">name VARCHAR(50),</text:p>
      <text:p text:style-name="Standard">category VARCHAR(50),</text:p>
      <text:p text:style-name="Standard">price DECIMAL(10,2),</text:p>
      <text:p text:style-name="Standard">stock INT</text:p>
      <text:p text:style-name="Standard">);</text:p>
      <text:p text:style-name="Standard">4. Order_Items : Stores products included in an order.</text:p>
      <text:p text:style-name="Standard">CREATE TABLE Order_Items (</text:p>
      <text:p text:style-name="Standard">order_item_id INT PRIMARY KEY,</text:p>
      <text:p text:style-name="Standard">order_id INT,</text:p>
      <text:p text:style-name="Standard">product_id INT,</text:p>
      <text:p text:style-name="Standard">quantity INT,</text:p>
      <text:p text:style-name="Standard">subtotal DECIMAL(10,2),</text:p>
      <text:p text:style-name="Standard">FOREIGN KEY (order_id) REFERENCES Orders(order_id),</text:p>
      <text:p text:style-name="Standard">FOREIGN KEY (product_id) REFERENCES Products(product_id)</text:p>
      <text:p text:style-name="Standard">);</text:p>
      <text:p text:style-name="Standard"/>
      <text:p text:style-name="Standard"/>
      <text:p text:style-name="Standard"/>
      <text:p text:style-name="Standard">Solve following queries :</text:p>
      <text:p text:style-name="Standard">1. Find the total amount spent by customer ID 3 (sum of all their orders).</text:p>
      <text:p text:style-name="Standard"/>
      <text:p text:style-name="Standard"><draw:frame draw:style-name="fr20" draw:name="Image1" text:anchor-type="char" svg:width="17cm" svg:height="2.833cm" draw:z-index="0"><draw:image xlink:href="Pictures/100002010000064000000384AC36E569AF0E0C21.png" xlink:type="simple" xlink:show="embed" xlink:actuate="onLoad" loext:mime-type="image/png"/></draw:frame></text:p>
      <text:p text:style-name="Standard"/>
      <text:p text:style-name="Standard"><text:soft-page-break/></text:p>
      <text:p text:style-name="Standard">2. Find the total revenue generated from all orders.</text:p>
      <text:p text:style-name="Standard"/>
      <text:p text:style-name="Standard"><draw:frame draw:style-name="fr19" draw:name="Image2" text:anchor-type="char" svg:x="0.026cm" svg:y="0.339cm" svg:width="17cm" svg:height="2.277cm" draw:z-index="1"><draw:image xlink:href="Pictures/100002010000064000000384AC36E569AF0E0C2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3. Calculate the stock value (price × stock) for each product.</text:p>
      <text:p text:style-name="Standard"/>
      <text:p text:style-name="Standard"/>
      <text:p text:style-name="Standard"><draw:frame draw:style-name="fr18" draw:name="Image3" text:anchor-type="char" svg:x="0cm" svg:y="0.242cm" svg:width="17cm" svg:height="2.963cm" draw:z-index="2"><draw:image xlink:href="Pictures/100002010000064000000384AC36E569AF0E0C21.png" xlink:type="simple" xlink:show="embed" xlink:actuate="onLoad" loext:mime-type="image/png"/></draw:frame></text:p>
      <text:p text:style-name="Standard"/>
      <text:p text:style-name="Standard"/>
      <text:p text:style-name="Standard">4. Retrieve customers who are above 30 years old and live in "New York".</text:p>
      <text:p text:style-name="Standard"/>
      <text:p text:style-name="Standard"><draw:frame draw:style-name="fr17" draw:name="Image4" text:anchor-type="char" svg:width="17cm" svg:height="3.256cm" draw:z-index="3"><draw:image xlink:href="Pictures/1000020100000640000003848A0D8AB82C7C4AB2.png" xlink:type="simple" xlink:show="embed" xlink:actuate="onLoad" loext:mime-type="image/png"/></draw:frame></text:p>
      <text:p text:style-name="Standard">5. Find customers who either live in "Los Angeles" or have placed an order worth more</text:p>
      <text:p text:style-name="Standard">than $500.</text:p>
      <text:p text:style-name="Standard"/>
      <text:p text:style-name="Standard"><draw:frame draw:style-name="fr16" draw:name="Image5" text:anchor-type="char" svg:x="0cm" svg:y="0.011cm" svg:width="17cm" svg:height="2.646cm" draw:z-index="4"><draw:image xlink:href="Pictures/1000020100000640000003848A0D8AB82C7C4AB2.png" xlink:type="simple" xlink:show="embed" xlink:actuate="onLoad" loext:mime-type="image/png"/></draw:frame></text:p>
      <text:p text:style-name="Standard"/>
      <text:p text:style-name="Standard">6. List products that are in stock but cost less than $50.</text:p>
      <text:p text:style-name="Standard"/>
      <text:p text:style-name="Standard"/>
      <text:p text:style-name="Standard"><draw:frame draw:style-name="fr15" draw:name="Image6" text:anchor-type="char" svg:x="0.053cm" svg:y="-2cm" svg:width="17cm" svg:height="2.464cm" draw:z-index="5"><draw:image xlink:href="Pictures/1000020100000640000003848A0D8AB82C7C4AB2.png" xlink:type="simple" xlink:show="embed" xlink:actuate="onLoad" loext:mime-type="image/png"/></draw:frame><text:soft-page-break/></text:p>
      <text:p text:style-name="Standard"/>
      <text:p text:style-name="Standard">7. Find Products That Have Less Than 5 Items in Stock</text:p>
      <text:p text:style-name="Standard"/>
      <text:p text:style-name="Standard"><draw:frame draw:style-name="fr14" draw:name="Image7" text:anchor-type="char" svg:width="17cm" svg:height="3.134cm" draw:z-index="6"><draw:image xlink:href="Pictures/1000020100000640000003842579F13FD1576389.png" xlink:type="simple" xlink:show="embed" xlink:actuate="onLoad" loext:mime-type="image/png"/></draw:frame></text:p>
      <text:p text:style-name="Standard"/>
      <text:p text:style-name="Standard">8. Find orders that are not completed (status is not 'Completed').</text:p>
      <text:p text:style-name="Standard"><draw:frame draw:style-name="fr13" draw:name="Image8" text:anchor-type="char" svg:x="-0.159cm" svg:y="0.443cm" svg:width="17cm" svg:height="2.727cm" draw:z-index="7"><draw:image xlink:href="Pictures/1000020100000640000003842579F13FD157638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9. Find products that are out of stock or belong to the "Electronics" category.</text:p>
      <text:p text:style-name="Standard"/>
      <text:p text:style-name="Standard"><draw:frame draw:style-name="fr12" draw:name="Image9" text:anchor-type="char" svg:x="0cm" svg:y="0.12cm" svg:width="17cm" svg:height="2.752cm" draw:z-index="8"><draw:image xlink:href="Pictures/1000020100000640000003842579F13FD157638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10. List all email addresses that belong to Gmail.</text:p>
      <text:p text:style-name="Standard"/>
      <text:p text:style-name="Standard"><draw:frame draw:style-name="fr11" draw:name="Image10" text:anchor-type="char" svg:width="17cm" svg:height="3.337cm" draw:z-index="9"><draw:image xlink:href="Pictures/1000020100000640000003840F2876BE928F9EA6.png" xlink:type="simple" xlink:show="embed" xlink:actuate="onLoad" loext:mime-type="image/png"/></draw:frame></text:p>
      <text:p text:style-name="Standard"/>
      <text:p text:style-name="Standard">11. Find product names containing the word "Phone".</text:p>
      <text:p text:style-name="Standard"/>
      <text:p text:style-name="Standard"/>
      <text:p text:style-name="Standard"/>
      <text:p text:style-name="Standard"><draw:frame draw:style-name="fr10" draw:name="Image11" text:anchor-type="char" svg:x="0.185cm" svg:y="-1.612cm" svg:width="17cm" svg:height="2.304cm" draw:z-index="10"><draw:image xlink:href="Pictures/1000020100000640000003840F2876BE928F9EA6.png" xlink:type="simple" xlink:show="embed" xlink:actuate="onLoad" loext:mime-type="image/png"/></draw:frame><text:soft-page-break/></text:p>
      <text:p text:style-name="Standard"/>
      <text:p text:style-name="Standard">12. Find customers whose names have exactly 5 characters.</text:p>
      <text:p text:style-name="Standard"/>
      <text:p text:style-name="Standard"/>
      <text:p text:style-name="Standard"><draw:frame draw:style-name="fr9" draw:name="Image12" text:anchor-type="char" svg:x="-0.026cm" svg:y="0.051cm" svg:width="17cm" svg:height="2.489cm" draw:z-index="11"><draw:image xlink:href="Pictures/1000020100000640000003840F2876BE928F9EA6.png" xlink:type="simple" xlink:show="embed" xlink:actuate="onLoad" loext:mime-type="image/png"/></draw:frame></text:p>
      <text:p text:style-name="Standard"/>
      <text:p text:style-name="Standard"/>
      <text:p text:style-name="Standard">13. Find Products That Have "Laptop" or "Tablet" in Their Name</text:p>
      <text:p text:style-name="Standard"/>
      <text:p text:style-name="Standard"/>
      <text:p text:style-name="Standard"><draw:frame draw:style-name="fr8" draw:name="Image13" text:anchor-type="char" svg:width="17cm" svg:height="3.217cm" draw:z-index="12"><draw:image xlink:href="Pictures/100002010000064000000384D98D24EFD5465804.png" xlink:type="simple" xlink:show="embed" xlink:actuate="onLoad" loext:mime-type="image/png"/></draw:frame></text:p>
      <text:p text:style-name="Standard">14. Retrieve orders placed in the year 2024.</text:p>
      <text:p text:style-name="Standard"><draw:frame draw:style-name="fr7" draw:name="Image14" text:anchor-type="char" svg:x="-0.291cm" svg:y="0.482cm" svg:width="17cm" svg:height="3.096cm" draw:z-index="13"><draw:image xlink:href="Pictures/100002010000064000000384D98D24EFD5465804.png" xlink:type="simple" xlink:show="embed" xlink:actuate="onLoad" loext:mime-type="image/png"/></draw:frame></text:p>
      <text:p text:style-name="Standard"/>
      <text:p text:style-name="Standard"/>
      <text:p text:style-name="Standard">15. Find customers who live in "New York", "Los Angeles", or "Chicago".</text:p>
      <text:p text:style-name="Standard"/>
      <text:p text:style-name="Standard"/>
      <text:p text:style-name="Standard"><draw:frame draw:style-name="fr2" draw:name="Image17" text:anchor-type="char" svg:x="-0.409cm" svg:y="0.051cm" svg:width="17cm" svg:height="2.963cm" draw:z-index="18"><draw:image xlink:href="Pictures/100002010000064000000384D98D24EFD5465804.png" xlink:type="simple" xlink:show="embed" xlink:actuate="onLoad" loext:mime-type="image/png"/></draw:frame></text:p>
      <text:p text:style-name="Standard"/>
      <text:p text:style-name="Standard">16. List products that do not belong to the 'Electronics' or 'Clothing' categories.</text:p>
      <text:p text:style-name="Standard"/>
      <text:p text:style-name="Standard"><draw:frame draw:style-name="fr6" draw:name="Image16" text:anchor-type="char" svg:width="17cm" svg:height="2.981cm" draw:z-index="14"><draw:image xlink:href="Pictures/100002010000064000000384EEFE25D327D6D8C8.png" xlink:type="simple" xlink:show="embed" xlink:actuate="onLoad" loext:mime-type="image/png"/></draw:frame><text:soft-page-break/></text:p>
      <text:p text:style-name="Standard"/>
      <text:p text:style-name="Standard">17. Find orders placed by customers with IDs 1, 3, or 5.</text:p>
      <text:p text:style-name="Standard"/>
      <text:p text:style-name="Standard"><draw:frame draw:style-name="fr5" draw:name="Image18" text:anchor-type="char" svg:x="-0.45cm" svg:y="0.247cm" svg:width="17cm" svg:height="2.568cm" draw:z-index="15"><draw:image xlink:href="Pictures/100002010000064000000384EEFE25D327D6D8C8.png" xlink:type="simple" xlink:show="embed" xlink:actuate="onLoad" loext:mime-type="image/png"/></draw:frame></text:p>
      <text:p text:style-name="Standard"/>
      <text:p text:style-name="Standard">18. Find customers who have not placed any orders.</text:p>
      <text:p text:style-name="Standard"><draw:frame draw:style-name="fr1" draw:name="Image15" text:anchor-type="char" svg:x="-0.397cm" svg:y="0.469cm" svg:width="17cm" svg:height="2.646cm" draw:z-index="19"><draw:image xlink:href="Pictures/100002010000064000000384EEFE25D327D6D8C8.png" xlink:type="simple" xlink:show="embed" xlink:actuate="onLoad" loext:mime-type="image/png"/></draw:frame></text:p>
      <text:p text:style-name="Standard"/>
      <text:p text:style-name="Standard"/>
      <text:p text:style-name="Standard">19. Show All Orders Placed in the Last 30 Days</text:p>
      <text:p text:style-name="Standard"/>
      <text:p text:style-name="Standard"><draw:frame draw:style-name="fr4" draw:name="Image19" text:anchor-type="char" svg:x="-0.609cm" svg:y="0.291cm" svg:width="17cm" svg:height="1.653cm" draw:z-index="16"><draw:image xlink:href="Pictures/100002010000064000000384EEFE25D327D6D8C8.png" xlink:type="simple" xlink:show="embed" xlink:actuate="onLoad" loext:mime-type="image/png"/></draw:frame></text:p>
      <text:p text:style-name="Standard"/>
      <text:p text:style-name="Standard"/>
      <text:p text:style-name="Standard">20. Find Orders Where the Total Amount is an Exact Multiple of 100<draw:frame draw:style-name="fr3" draw:name="Image20" text:anchor-type="char" svg:x="-0.582cm" svg:y="1.339cm" svg:width="17cm" svg:height="3.124cm" draw:z-index="17"><draw:image xlink:href="Pictures/1000020100000640000003849EAD63636CB632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0T15:25:20.267642448</meta:creation-date>
    <dc:date>2025-02-10T15:43:08.002219421</dc:date>
    <meta:editing-duration>PT6M48S</meta:editing-duration>
    <meta:editing-cycles>1</meta:editing-cycles>
    <meta:document-statistic meta:table-count="0" meta:image-count="20" meta:object-count="0" meta:page-count="5" meta:paragraph-count="58" meta:word-count="348" meta:character-count="2122" meta:non-whitespace-character-count="1828"/>
    <meta:generator>LibreOffice/6.4.7.2$Linux_X86_64 LibreOffice_project/40$Build-2</meta:generator>
  </office:meta>
</office:document-meta>
</file>